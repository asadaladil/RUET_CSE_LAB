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03D09A64DAE1CDFEBA8.png" manifest:media-type="image/png"/>
  <manifest:file-entry manifest:full-path="Pictures/10000001000003220000003D18E9E31D196339A6.png" manifest:media-type="image/png"/>
  <manifest:file-entry manifest:full-path="Pictures/100000010000031D0000003E74D1A318FF29CB1E.png" manifest:media-type="image/png"/>
  <manifest:file-entry manifest:full-path="Pictures/10000001000003250000003A302E095FC8728469.png" manifest:media-type="image/png"/>
  <manifest:file-entry manifest:full-path="Pictures/100000010000031E0000003E3D9BF70D80C13504.png" manifest:media-type="image/png"/>
  <manifest:file-entry manifest:full-path="Pictures/10000001000003210000003E0C3EA276414762B7.png" manifest:media-type="image/png"/>
  <manifest:file-entry manifest:full-path="Pictures/10000001000003270000003DCDA2B7818780F9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Table1" style:family="table">
      <style:table-properties style:width="3.8451in" fo:margin-left="1.3493in" table:align="left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1.309in"/>
    </style:style>
    <style:style style:name="Table1.C" style:family="table-column">
      <style:table-column-properties style:column-width="1.279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3" style:family="table">
      <style:table-properties style:width="4.8333in" fo:margin-left="0.9326in" table:align="left"/>
    </style:style>
    <style:style style:name="Table3.A" style:family="table-column">
      <style:table-column-properties style:column-width="1.2563in"/>
    </style:style>
    <style:style style:name="Table3.B" style:family="table-column">
      <style:table-column-properties style:column-width="1.1542in"/>
    </style:style>
    <style:style style:name="Table3.C" style:family="table-column">
      <style:table-column-properties style:column-width="1.2208in"/>
    </style:style>
    <style:style style:name="Table3.D" style:family="table-column">
      <style:table-column-properties style:column-width="1.2021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4" style:family="table">
      <style:table-properties style:width="6.6903in" table:align="left"/>
    </style:style>
    <style:style style:name="Table4.A" style:family="table-column">
      <style:table-column-properties style:column-width="3.3465in"/>
    </style:style>
    <style:style style:name="Table4.B" style:family="table-column">
      <style:table-column-properties style:column-width="3.3438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4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75in" fo:margin-left="0.4146in" table:align="left"/>
    </style:style>
    <style:style style:name="Table5.A" style:family="table-column">
      <style:table-column-properties style:column-width="1.4347in"/>
    </style:style>
    <style:style style:name="Table5.B" style:family="table-column">
      <style:table-column-properties style:column-width="1.1903in"/>
    </style:style>
    <style:style style:name="Table5.C" style:family="table-column">
      <style:table-column-properties style:column-width="1.3097in"/>
    </style:style>
    <style:style style:name="Table5.D" style:family="table-column">
      <style:table-column-properties style:column-width="1.815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1" style:family="table-row">
      <style:table-row-properties style:min-row-height="0.0951in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3" style:family="table-row">
      <style:table-row-properties style:min-row-height="0.9931in"/>
    </style:style>
    <style:style style:name="Table7" style:family="table">
      <style:table-properties style:width="4.5951in" fo:margin-left="1.0757in" table:align="left"/>
    </style:style>
    <style:style style:name="Table7.A" style:family="table-column">
      <style:table-column-properties style:column-width="1.1431in"/>
    </style:style>
    <style:style style:name="Table7.B" style:family="table-column">
      <style:table-column-properties style:column-width="1.125in"/>
    </style:style>
    <style:style style:name="Table7.C" style:family="table-column">
      <style:table-column-properties style:column-width="1.3153in"/>
    </style:style>
    <style:style style:name="Table7.D" style:family="table-column">
      <style:table-column-properties style:column-width="1.0118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3" style:family="table-row">
      <style:table-row-properties style:min-row-height="1.0951in"/>
    </style:style>
    <style:style style:name="Table9" style:family="table">
      <style:table-properties style:width="5.9701in" fo:margin-left="0.3972in" table:align="left"/>
    </style:style>
    <style:style style:name="Table9.A" style:family="table-column">
      <style:table-column-properties style:column-width="0.9403in"/>
    </style:style>
    <style:style style:name="Table9.B" style:family="table-column">
      <style:table-column-properties style:column-width="1.3396in"/>
    </style:style>
    <style:style style:name="Table9.C" style:family="table-column">
      <style:table-column-properties style:column-width="1.3389in"/>
    </style:style>
    <style:style style:name="Table9.E" style:family="table-column">
      <style:table-column-properties style:column-width="1.0118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E1" style:family="table-cell">
      <style:table-cell-properties fo:padding="0.0382in" fo:border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officeooo:paragraph-rsid="001814da" style:font-size-asian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officeooo:paragraph-rsid="001814da" style:font-size-asian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officeooo:rsid="001814da" officeooo:paragraph-rsid="001814da" style:font-size-asian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1814da" officeooo:paragraph-rsid="001814da" style:font-size-asian="13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18c016" officeooo:paragraph-rsid="0018c016" style:font-size-asian="13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officeooo:paragraph-rsid="001814da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1814da" officeooo:paragraph-rsid="001814d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1814da" officeooo:paragraph-rsid="0018c01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1pt" fo:font-weight="bold" officeooo:rsid="0018c016" officeooo:paragraph-rsid="0018c016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0pt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1pt" style:font-size-asian="13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18c016" officeooo:paragraph-rsid="0018c016" style:font-size-asian="13pt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1pt" fo:font-weight="bold" officeooo:rsid="0018c016" officeooo:paragraph-rsid="0018c016" style:font-size-asian="13pt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8pt" officeooo:paragraph-rsid="001814da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814da" officeooo:paragraph-rsid="001814d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814da" officeooo:paragraph-rsid="001814da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23" style:family="paragraph" style:parent-style-name="Table_20_Contents">
      <style:paragraph-properties fo:text-align="justify" style:justify-single-word="false"/>
      <style:text-properties style:font-name="Century Gothic" fo:font-size="8pt" officeooo:paragraph-rsid="001814da" style:font-size-asian="8pt" style:font-size-complex="8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1pt" fo:font-weight="bold" officeooo:rsid="0018c016" officeooo:paragraph-rsid="0018c01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1" fo:font-size="11pt" fo:font-weight="bold" officeooo:rsid="0018c016" officeooo:paragraph-rsid="0018c016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1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Century Gothic1" fo:font-size="8pt" style:font-size-asian="8pt" style:font-size-complex="8pt"/>
    </style:style>
    <style:style style:name="T1" style:family="text">
      <style:text-properties style:font-name="Calibri,Bold" fo:font-size="13pt" style:font-size-asian="13pt"/>
    </style:style>
    <style:style style:name="T2" style:family="text">
      <style:text-properties fo:font-size="13pt" style:font-size-asian="13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nsolas"/>
    </style:style>
    <style:style style:name="T5" style:family="text">
      <style:text-properties style:font-name="Consolas" fo:font-size="11pt" style:font-size-asian="11pt"/>
    </style:style>
    <style:style style:name="T6" style:family="text">
      <style:text-properties officeooo:rsid="0018c016"/>
    </style:style>
    <style:style style:name="T7" style:family="text">
      <style:text-properties fo:font-size="11pt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opic 2 </text:span>[<text:span text:style-name="T3">Types of Inheritance</text:span>]: </text:p>
      <text:p text:style-name="P2">Learn and Test different types of inheritance in C++. In each inheritance draw the class diagram with class chain and try to access the data members of bases classes from child classes.</text:p>
      <text:p text:style-name="P10"/>
      <text:p text:style-name="P10">i)Single Level Inheritance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class A</text:p>
            <text:p text:style-name="P7">{</text:p>
            <text:p text:style-name="P6"><text:s text:c="3"/>private:</text:p>
            <text:p text:style-name="P6"><text:s text:c="4"/>int x;</text:p>
            <text:p text:style-name="P6"><text:s text:c="3"/>protected:</text:p>
            <text:p text:style-name="P6"><text:s text:c="4"/>int y;</text:p>
            <text:p text:style-name="P6"><text:s text:c="3"/>public:</text:p>
            <text:p text:style-name="P6"><text:s text:c="3"/>int z;</text:p>
            <text:p text:style-name="P8">}</text:p>
          </table:table-cell>
          <table:table-cell table:style-name="Table1.A1" office:value-type="string">
            <text:p text:style-name="P7">class B:public A</text:p>
            <text:p text:style-name="P7">{</text:p>
            <text:p text:style-name="P6">//write public method to access</text:p>
            <text:p text:style-name="P6">// x,y &amp; z</text:p>
            <text:p text:style-name="P8">}</text:p>
          </table:table-cell>
          <table:table-cell table:style-name="Table1.C1" office:value-type="string">
            <text:p text:style-name="P7">int main()</text:p>
            <text:p text:style-name="P7">{</text:p>
            <text:p text:style-name="P6">B b;</text:p>
            <text:p text:style-name="P6">//call methods of</text:p>
            <text:p text:style-name="P6">class B</text:p>
            <text:p text:style-name="P6">return 0;</text:p>
            <text:p text:style-name="P8">}</text:p>
          </table:table-cell>
        </table:table-row>
      </table:table>
      <text:p text:style-name="P3"/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0">Code</text:p>
          </table:table-cell>
          <table:covered-table-cell/>
        </table:table-row>
        <table:table-row>
          <table:table-cell table:style-name="Table4.A2" office:value-type="string">
            <text:p text:style-name="P23">class A</text:p>
            <text:p text:style-name="P23">{</text:p>
            <text:p text:style-name="P23"><text:s text:c="4"/>private:</text:p>
            <text:p text:style-name="P23"><text:s text:c="4"/>int x;</text:p>
            <text:p text:style-name="P23"><text:s text:c="4"/>protected:</text:p>
            <text:p text:style-name="P23"><text:s text:c="4"/>int y;</text:p>
            <text:p text:style-name="P23"><text:s text:c="4"/>public:</text:p>
            <text:p text:style-name="P23"><text:s text:c="4"/>int z;</text:p>
            <text:p text:style-name="P23">};</text:p>
            <text:p text:style-name="P23"/>
            <text:p text:style-name="P19">}</text:p>
          </table:table-cell>
          <table:table-cell table:style-name="Table4.B2" office:value-type="string">
            <text:p text:style-name="P23">class B:public A</text:p>
            <text:p text:style-name="P23">{</text:p>
            <text:p text:style-name="P23"><text:s text:c="4"/>public:</text:p>
            <text:p text:style-name="P23"><text:s text:c="4"/>void printx(){cout&lt;&lt;x&lt;&lt;" ";}</text:p>
            <text:p text:style-name="P23"><text:s text:c="4"/>void printy(){cout&lt;&lt;y&lt;&lt; " ";}</text:p>
            <text:p text:style-name="P23"><text:s text:c="4"/>void printz(){cout&lt;&lt;z&lt;&lt; " " ;}</text:p>
            <text:p text:style-name="P23"/>
            <text:p text:style-name="P23">};</text:p>
            <text:p text:style-name="P23">int main(){</text:p>
            <text:p text:style-name="P23"><text:s text:c="4"/>B b;</text:p>
            <text:p text:style-name="P23"><text:s text:c="4"/>b.printx();b.printy();b.printz();<text:span text:style-name="T6">}</text:span></text:p>
          </table:table-cell>
        </table:table-row>
        <table:table-row table:style-name="Table4.3">
          <table:table-cell table:style-name="Table4.B2" table:number-columns-spanned="2" office:value-type="string">
            <text:p text:style-name="P21">Result:<draw:frame draw:style-name="fr1" draw:name="Image1" text:anchor-type="char" svg:x="1.9689in" svg:y="0.0299in" svg:width="4.5484in" svg:height="0.3453in" draw:z-index="0"><draw:image xlink:href="Pictures/10000001000003220000003D18E9E31D196339A6.png" xlink:type="simple" xlink:show="embed" xlink:actuate="onLoad" draw:mime-type="image/png"/></draw:frame></text:p>
          </table:table-cell>
          <table:covered-table-cell/>
        </table:table-row>
      </table:table>
      <text:p text:style-name="P3"/>
      <text:p text:style-name="P4">ii)Multi-level Inheritance: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class A{</text:p>
            <text:p text:style-name="P6">private:</text:p>
            <text:p text:style-name="P6">int x;</text:p>
            <text:p text:style-name="P6">protected:</text:p>
            <text:p text:style-name="P6">int y;</text:p>
            <text:p text:style-name="P6">public:</text:p>
            <text:p text:style-name="P6">int z;</text:p>
            <text:p text:style-name="P8">}</text:p>
          </table:table-cell>
          <table:table-cell table:style-name="Table3.A1" office:value-type="string">
            <text:p text:style-name="P6">class B:public A{</text:p>
            <text:p text:style-name="P8">}</text:p>
          </table:table-cell>
          <table:table-cell table:style-name="Table3.A1" office:value-type="string">
            <text:p text:style-name="P6">class C:public</text:p>
            <text:p text:style-name="P6">B{</text:p>
            <text:p text:style-name="P6">//write public</text:p>
            <text:p text:style-name="P6">//method to</text:p>
            <text:p text:style-name="P6">//access x,y &amp; z</text:p>
            <text:p text:style-name="P8">}</text:p>
          </table:table-cell>
          <table:table-cell table:style-name="Table3.D1" office:value-type="string">
            <text:p text:style-name="P6">int main(){</text:p>
            <text:p text:style-name="P6">C c;</text:p>
            <text:p text:style-name="P6">//call</text:p>
            <text:p text:style-name="P6">//methods of</text:p>
            <text:p text:style-name="P6">//class C</text:p>
            <text:p text:style-name="P6">return 0</text:p>
            <text:p text:style-name="P8">}</text:p>
          </table:table-cell>
        </table:table-row>
      </table:table>
      <text:p text:style-name="P4"><draw:frame draw:style-name="fr1" draw:name="Image2" text:anchor-type="char" svg:x="1.3366in" svg:y="2.3028in" svg:width="5.1028in" svg:height="0.3972in" draw:z-index="1"><draw:image xlink:href="Pictures/100000010000031D0000003E74D1A318FF29CB1E.png" xlink:type="simple" xlink:show="embed" xlink:actuate="onLoad" draw:mime-type="image/png"/></draw:frame>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7">Code</text:p>
          </table:table-cell>
          <table:covered-table-cell/>
        </table:table-row>
        <table:table-row>
          <table:table-cell table:style-name="Table2.A2" office:value-type="string">
            <text:p text:style-name="P22">class A</text:p>
            <text:p text:style-name="P22">{</text:p>
            <text:p text:style-name="P22"><text:s text:c="2"/>private:</text:p>
            <text:p text:style-name="P22"><text:s text:c="4"/>int x;</text:p>
            <text:p text:style-name="P22"><text:s text:c="2"/>protected:</text:p>
            <text:p text:style-name="P22"><text:s text:c="4"/>int y;</text:p>
            <text:p text:style-name="P22"><text:s text:c="2"/>public:</text:p>
            <text:p text:style-name="P22"><text:s text:c="4"/>int z;</text:p>
            <text:p text:style-name="P22">};</text:p>
            <text:p text:style-name="P22">class B:public A</text:p>
            <text:p text:style-name="P22">{</text:p>
            <text:p text:style-name="P22">};</text:p>
          </table:table-cell>
          <table:table-cell table:style-name="Table2.B2" office:value-type="string">
            <text:p text:style-name="P22">class C:public B</text:p>
            <text:p text:style-name="P22">{</text:p>
            <text:p text:style-name="P22"><text:s/>public:</text:p>
            <text:p text:style-name="P22"><text:s text:c="4"/>void printx(){cout&lt;&lt;x&lt;&lt;" ";}</text:p>
            <text:p text:style-name="P22"><text:s text:c="4"/>void printy(){cout&lt;&lt;y&lt;&lt; " ";}</text:p>
            <text:p text:style-name="P22"><text:s text:c="4"/>void printz(){cout&lt;&lt;z&lt;&lt; " " ;}</text:p>
            <text:p text:style-name="P22">};</text:p>
            <text:p text:style-name="P22">int main()</text:p>
            <text:p text:style-name="P22">{</text:p>
            <text:p text:style-name="P22"><text:s text:c="4"/>C c;</text:p>
            <text:p text:style-name="P22"><text:s text:c="4"/>c.printx();c.printy();c.printz();</text:p>
            <text:p text:style-name="P22"><text:s text:c="4"/>return 0;</text:p>
            <text:p text:style-name="P22">}</text:p>
          </table:table-cell>
        </table:table-row>
        <table:table-row>
          <table:table-cell table:style-name="Table2.B2" table:number-columns-spanned="2" office:value-type="string">
            <text:p text:style-name="P18">Result:</text:p>
            <text:p text:style-name="P16"/>
          </table:table-cell>
          <table:covered-table-cell/>
        </table:table-row>
      </table:table>
      <text:p text:style-name="P4"/>
      <text:p text:style-name="P5"><text:soft-page-break/>iii) Multiple Inheritance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class A{</text:p>
            <text:p text:style-name="P6">private:</text:p>
            <text:p text:style-name="P6">int x;</text:p>
            <text:p text:style-name="P6">protected:</text:p>
            <text:p text:style-name="P6">int y;</text:p>
            <text:p text:style-name="P6">public:</text:p>
            <text:p text:style-name="P6">int z;</text:p>
            <text:p text:style-name="P8">}</text:p>
          </table:table-cell>
          <table:table-cell table:style-name="Table5.A1" office:value-type="string">
            <text:p text:style-name="P6">class B{</text:p>
            <text:p text:style-name="P6">private:</text:p>
            <text:p text:style-name="P6">int p;</text:p>
            <text:p text:style-name="P6">protected:</text:p>
            <text:p text:style-name="P6">int q;</text:p>
            <text:p text:style-name="P6">public:</text:p>
            <text:p text:style-name="P6">int r;</text:p>
            <text:p text:style-name="P8">}</text:p>
          </table:table-cell>
          <table:table-cell table:style-name="Table5.A1" office:value-type="string">
            <text:p text:style-name="P6">class C:public A,</text:p>
            <text:p text:style-name="P6">Public B{</text:p>
            <text:p text:style-name="P6">//write public</text:p>
            <text:p text:style-name="P6">method //to access</text:p>
            <text:p text:style-name="P6">//x,y,z,p,q &amp; r</text:p>
            <text:p text:style-name="P8">}</text:p>
          </table:table-cell>
          <table:table-cell table:style-name="Table5.D1" office:value-type="string">
            <text:p text:style-name="P6">int main(){</text:p>
            <text:p text:style-name="P6">C c;</text:p>
            <text:p text:style-name="P6">//call</text:p>
            <text:p text:style-name="P6">//methods of</text:p>
            <text:p text:style-name="P6">//class C</text:p>
            <text:p text:style-name="P6">return 0</text:p>
            <text:p text:style-name="P8">}</text:p>
          </table:table-cell>
        </table:table-row>
      </table:table>
      <text:p text:style-name="P5"/>
      <table:table table:name="Table6" table:style-name="Table6">
        <table:table-column table:style-name="Table6.A" table:number-columns-repeated="2"/>
        <table:table-row table:style-name="Table6.1">
          <table:table-cell table:style-name="Table6.A1" table:number-columns-spanned="2" office:value-type="string">
            <text:p text:style-name="P17">Code</text:p>
          </table:table-cell>
          <table:covered-table-cell/>
        </table:table-row>
        <table:table-row>
          <table:table-cell table:style-name="Table6.A2" office:value-type="string">
            <text:p text:style-name="P22">class A</text:p>
            <text:p text:style-name="P22">{</text:p>
            <text:p text:style-name="P22">private:</text:p>
            <text:p text:style-name="P22"><text:s text:c="4"/>int x;</text:p>
            <text:p text:style-name="P22">protected:</text:p>
            <text:p text:style-name="P22"><text:s text:c="4"/>int y;</text:p>
            <text:p text:style-name="P22">public:</text:p>
            <text:p text:style-name="P22"><text:s text:c="4"/>int z;</text:p>
            <text:p text:style-name="P22">};</text:p>
            <text:p text:style-name="P22">class B</text:p>
            <text:p text:style-name="P22">{</text:p>
            <text:p text:style-name="P22">private:</text:p>
            <text:p text:style-name="P22"><text:s text:c="4"/>int p;</text:p>
            <text:p text:style-name="P22">protected:</text:p>
            <text:p text:style-name="P22"><text:s text:c="4"/>int q;</text:p>
            <text:p text:style-name="P22">public:</text:p>
            <text:p text:style-name="P22"><text:s text:c="4"/>int r;</text:p>
            <text:p text:style-name="P22">};</text:p>
          </table:table-cell>
          <table:table-cell table:style-name="Table6.B2" office:value-type="string">
            <text:p text:style-name="P22">class C:public A,public B</text:p>
            <text:p text:style-name="P22">{</text:p>
            <text:p text:style-name="P22"><text:s text:c="4"/>public:</text:p>
            <text:p text:style-name="P22"><text:s text:c="4"/>void printx(){cout&lt;&lt;x&lt;&lt;" ";}</text:p>
            <text:p text:style-name="P22"><text:s text:c="4"/>void printy(){cout&lt;&lt;y&lt;&lt; " ";}</text:p>
            <text:p text:style-name="P22"><text:s text:c="4"/>void printz(){cout&lt;&lt;z&lt;&lt; " " ;}</text:p>
            <text:p text:style-name="P22"><text:s text:c="4"/>void printp(){cout&lt;&lt;p&lt;&lt;" ";}</text:p>
            <text:p text:style-name="P22"><text:s text:c="4"/>void printq(){cout&lt;&lt;q&lt;&lt; " ";}</text:p>
            <text:p text:style-name="P22"><text:s text:c="4"/>void printr(){cout&lt;&lt;r&lt;&lt; " " ;}</text:p>
            <text:p text:style-name="P22">};</text:p>
            <text:p text:style-name="P22">int main()</text:p>
            <text:p text:style-name="P22">{</text:p>
            <text:p text:style-name="P22"><text:s text:c="4"/>C c;</text:p>
            <text:p text:style-name="P22"><text:s text:c="4"/>c.printx();c.printy();c.printz();</text:p>
            <text:p text:style-name="P22"><text:s text:c="4"/>c.printp();c.printq();c.printr();</text:p>
            <text:p text:style-name="P22"><text:s text:c="4"/>return 0;</text:p>
            <text:p text:style-name="P22">}</text:p>
          </table:table-cell>
        </table:table-row>
        <table:table-row table:style-name="Table6.3">
          <table:table-cell table:style-name="Table6.B2" table:number-columns-spanned="2" office:value-type="string">
            <text:p text:style-name="P18">Result: <draw:frame draw:style-name="fr1" draw:name="Image3" text:anchor-type="char" svg:x="1.1453in" svg:y="0.0354in" svg:width="5.2791in" svg:height="0.3807in" draw:z-index="2"><draw:image xlink:href="Pictures/10000001000003250000003A302E095FC8728469.png" xlink:type="simple" xlink:show="embed" xlink:actuate="onLoad" draw:mime-type="image/png"/></draw:frame></text:p>
            <text:p text:style-name="P16"/>
            <text:p text:style-name="P16"><draw:frame draw:style-name="fr1" draw:name="Image4" text:anchor-type="char" svg:x="1.1362in" svg:y="0.1043in" svg:width="5.2346in" svg:height="0.4071in" draw:z-index="3"><draw:image xlink:href="Pictures/100000010000031E0000003E3D9BF70D80C13504.png" xlink:type="simple" xlink:show="embed" xlink:actuate="onLoad" draw:mime-type="image/png"/></draw:frame></text:p>
            <text:p text:style-name="P16"/>
            <text:p text:style-name="P16"/>
            <text:p text:style-name="P16"/>
          </table:table-cell>
          <table:covered-table-cell/>
        </table:table-row>
      </table:table>
      <text:p text:style-name="P5"/>
      <text:p text:style-name="P12">iv) Heirarchical inheritanc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4">class A{</text:p>
            <text:p text:style-name="P14">private:</text:p>
            <text:p text:style-name="P14">int x;</text:p>
            <text:p text:style-name="P14">protected:</text:p>
            <text:p text:style-name="P14">int y;</text:p>
            <text:p text:style-name="P14">public:</text:p>
            <text:p text:style-name="P15">int z;</text:p>
          </table:table-cell>
          <table:table-cell table:style-name="Table7.A1" office:value-type="string">
            <text:p text:style-name="P14">class B:public A</text:p>
            <text:p text:style-name="P14">{</text:p>
            <text:p text:style-name="P14">//write public</text:p>
            <text:p text:style-name="P14">method to access</text:p>
            <text:p text:style-name="P14">x,y &amp; z</text:p>
            <text:p text:style-name="P15">}</text:p>
          </table:table-cell>
          <table:table-cell table:style-name="Table7.A1" office:value-type="string">
            <text:p text:style-name="P14">class C:public A</text:p>
            <text:p text:style-name="P14">{</text:p>
            <text:p text:style-name="P14">//write method</text:p>
            <text:p text:style-name="P14">public to access</text:p>
            <text:p text:style-name="P14">x,y &amp; z</text:p>
            <text:p text:style-name="P15">}</text:p>
          </table:table-cell>
          <table:table-cell table:style-name="Table7.D1" office:value-type="string">
            <text:p text:style-name="P14">int main(){</text:p>
            <text:p text:style-name="P14">B b;</text:p>
            <text:p text:style-name="P14">C c;</text:p>
            <text:p text:style-name="P14">//call</text:p>
            <text:p text:style-name="P14">//methods of</text:p>
            <text:p text:style-name="P14">//class B &amp; C</text:p>
            <text:p text:style-name="P14">return 0</text:p>
            <text:p text:style-name="P15">}</text:p>
          </table:table-cell>
        </table:table-row>
      </table:table>
      <text:p text:style-name="P12"/>
      <table:table table:name="Table8" table:style-name="Table8">
        <table:table-column table:style-name="Table8.A" table:number-columns-repeated="2"/>
        <table:table-row>
          <table:table-cell table:style-name="Table8.A1" table:number-columns-spanned="2" office:value-type="string">
            <text:p text:style-name="P25">Code</text:p>
          </table:table-cell>
          <table:covered-table-cell/>
        </table:table-row>
        <table:table-row>
          <table:table-cell table:style-name="Table8.A2" office:value-type="string">
            <text:p text:style-name="P28">class A</text:p>
            <text:p text:style-name="P28">{</text:p>
            <text:p text:style-name="P28">private:</text:p>
            <text:p text:style-name="P28"><text:s text:c="4"/>int x;</text:p>
            <text:p text:style-name="P28">protected:</text:p>
            <text:p text:style-name="P28"><text:s text:c="4"/>int y;</text:p>
            <text:p text:style-name="P28">public:</text:p>
            <text:p text:style-name="P28"><text:s text:c="4"/>int z;</text:p>
            <text:p text:style-name="P28">};</text:p>
            <text:p text:style-name="P28">class B:public A</text:p>
            <text:p text:style-name="P28">{</text:p>
            <text:p text:style-name="P28"><text:s text:c="4"/>public:</text:p>
            <text:p text:style-name="P28"><text:s text:c="4"/>void printx(){cout&lt;&lt;x&lt;&lt;" ";}</text:p>
            <text:p text:style-name="P28"><text:s text:c="4"/>void printy(){cout&lt;&lt;y&lt;&lt; " ";}</text:p>
            <text:p text:style-name="P28"><text:s text:c="4"/>void printz(){cout&lt;&lt;z&lt;&lt; " " ;}</text:p>
            <text:p text:style-name="P28">};</text:p>
          </table:table-cell>
          <table:table-cell table:style-name="Table8.B2" office:value-type="string">
            <text:p text:style-name="P28">class C:public A</text:p>
            <text:p text:style-name="P28">{</text:p>
            <text:p text:style-name="P28"><text:s text:c="4"/>public:</text:p>
            <text:p text:style-name="P28"><text:s text:c="4"/>void printx(){cout&lt;&lt;x&lt;&lt;" ";}</text:p>
            <text:p text:style-name="P28"><text:s text:c="4"/>void printy(){cout&lt;&lt;y&lt;&lt; " ";}</text:p>
            <text:p text:style-name="P28"><text:s text:c="4"/>void printz(){cout&lt;&lt;z&lt;&lt; " " ;}</text:p>
            <text:p text:style-name="P28">};</text:p>
            <text:p text:style-name="P28">int main()</text:p>
            <text:p text:style-name="P28">{</text:p>
            <text:p text:style-name="P28"><text:s text:c="4"/>B b;</text:p>
            <text:p text:style-name="P28"><text:s text:c="4"/>C c;</text:p>
            <text:p text:style-name="P28"><text:s text:c="4"/>b.printx();b.printy();b.printz();</text:p>
            <text:p text:style-name="P28"><text:s text:c="4"/>c.printx();c.printy();c.printz();</text:p>
            <text:p text:style-name="P28"><text:s text:c="4"/>return 0;</text:p>
            <text:p text:style-name="P28">}</text:p>
          </table:table-cell>
        </table:table-row>
        <text:soft-page-break/>
        <table:table-row table:style-name="Table8.3">
          <table:table-cell table:style-name="Table8.B2" table:number-columns-spanned="2" office:value-type="string">
            <text:p text:style-name="P26">Result:<draw:frame draw:style-name="fr1" draw:name="Image5" text:anchor-type="char" svg:x="0.6689in" svg:y="0.0102in" svg:width="5.3783in" svg:height="0.4165in" draw:z-index="5"><draw:image xlink:href="Pictures/10000001000003210000003E0C3EA276414762B7.png" xlink:type="simple" xlink:show="embed" xlink:actuate="onLoad" draw:mime-type="image/png"/></draw:frame></text:p>
            <text:p text:style-name="P26"/>
            <text:p text:style-name="P26"><draw:frame draw:style-name="fr1" draw:name="Image6" text:anchor-type="char" svg:x="0.678in" svg:y="0.1134in" svg:width="5.4047in" svg:height="0.4118in" draw:z-index="4"><draw:image xlink:href="Pictures/10000001000003200000003D09A64DAE1CDFEBA8.png" xlink:type="simple" xlink:show="embed" xlink:actuate="onLoad" draw:mime-type="image/png"/></draw:frame></text:p>
            <text:p text:style-name="P26"/>
          </table:table-cell>
          <table:covered-table-cell/>
        </table:table-row>
      </table:table>
      <text:p text:style-name="P12"/>
      <text:p text:style-name="P12">v) Hybrid (Diamond) inheritance [virtual class]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office:value-type="string">
            <text:p text:style-name="P14">class A{</text:p>
            <text:p text:style-name="P14">private:</text:p>
            <text:p text:style-name="P14">int x;</text:p>
            <text:p text:style-name="P14">protected:</text:p>
            <text:p text:style-name="P14">int y;</text:p>
            <text:p text:style-name="P14">public:</text:p>
            <text:p text:style-name="P14">int z;</text:p>
            <text:p text:style-name="P15">}</text:p>
          </table:table-cell>
          <table:table-cell table:style-name="Table9.A1" office:value-type="string">
            <text:p text:style-name="P14">class B:public A</text:p>
            <text:p text:style-name="P14">{</text:p>
            <text:p text:style-name="P15">}</text:p>
          </table:table-cell>
          <table:table-cell table:style-name="Table9.A1" office:value-type="string">
            <text:p text:style-name="P14">class C:public A</text:p>
            <text:p text:style-name="P14">{</text:p>
            <text:p text:style-name="P15">}</text:p>
          </table:table-cell>
          <table:table-cell table:style-name="Table9.A1" office:value-type="string">
            <text:p text:style-name="P14">class D:public</text:p>
            <text:p text:style-name="P14">B, public C {</text:p>
            <text:p text:style-name="P14">//write</text:p>
            <text:p text:style-name="P14">public method</text:p>
            <text:p text:style-name="P14">to access x,y</text:p>
            <text:p text:style-name="P14">&amp; z</text:p>
            <text:p text:style-name="P15">}</text:p>
          </table:table-cell>
          <table:table-cell table:style-name="Table9.E1" office:value-type="string">
            <text:p text:style-name="P14">int main(){</text:p>
            <text:p text:style-name="P14">D d;</text:p>
            <text:p text:style-name="P14">//call</text:p>
            <text:p text:style-name="P14">//methods of</text:p>
            <text:p text:style-name="P14">//class D</text:p>
            <text:p text:style-name="P14">return 0</text:p>
            <text:p text:style-name="P15">}</text:p>
          </table:table-cell>
        </table:table-row>
      </table:table>
      <text:p text:style-name="P12"/>
      <table:table table:name="Table10" table:style-name="Table10">
        <table:table-column table:style-name="Table10.A" table:number-columns-repeated="2"/>
        <table:table-row>
          <table:table-cell table:style-name="Table10.A1" table:number-columns-spanned="2" office:value-type="string">
            <text:p text:style-name="P25">Code</text:p>
          </table:table-cell>
          <table:covered-table-cell/>
        </table:table-row>
        <table:table-row>
          <table:table-cell table:style-name="Table10.A2" office:value-type="string">
            <text:p text:style-name="P27">class A</text:p>
            <text:p text:style-name="P27">{</text:p>
            <text:p text:style-name="P27">private:</text:p>
            <text:p text:style-name="P27"><text:s text:c="4"/>int x;</text:p>
            <text:p text:style-name="P27">protected:</text:p>
            <text:p text:style-name="P27"><text:s text:c="4"/>int y;</text:p>
            <text:p text:style-name="P27">public:</text:p>
            <text:p text:style-name="P27"><text:s text:c="4"/>int z;</text:p>
            <text:p text:style-name="P27">};</text:p>
            <text:p text:style-name="P27">class B:public virtual A</text:p>
            <text:p text:style-name="P27">{</text:p>
            <text:p text:style-name="P27">};</text:p>
            <text:p text:style-name="P27">class C:public virtual A</text:p>
            <text:p text:style-name="P27">{</text:p>
            <text:p text:style-name="P27">};</text:p>
          </table:table-cell>
          <table:table-cell table:style-name="Table10.B2" office:value-type="string">
            <text:p text:style-name="P27">class D:public B, public C</text:p>
            <text:p text:style-name="P27">{</text:p>
            <text:p text:style-name="P27">public:</text:p>
            <text:p text:style-name="P27"><text:s text:c="4"/>void printx(){cout&lt;&lt;x&lt;&lt;" ";}</text:p>
            <text:p text:style-name="P27"><text:s text:c="4"/>void printy(){cout&lt;&lt;y&lt;&lt; " ";}</text:p>
            <text:p text:style-name="P27"><text:s text:c="4"/>void printz(){cout&lt;&lt;z&lt;&lt; " " ;}</text:p>
            <text:p text:style-name="P27">};</text:p>
            <text:p text:style-name="P27">int main()</text:p>
            <text:p text:style-name="P27">{</text:p>
            <text:p text:style-name="P27"><text:s text:c="4"/>D d;</text:p>
            <text:p text:style-name="P27"><text:s text:c="4"/>d.printx();d.printy();d.printz();</text:p>
            <text:p text:style-name="P27"><text:s text:c="4"/>return 0;</text:p>
            <text:p text:style-name="P27">}</text:p>
          </table:table-cell>
        </table:table-row>
        <table:table-row>
          <table:table-cell table:style-name="Table10.B2" table:number-columns-spanned="2" office:value-type="string">
            <text:p text:style-name="P26">Result:<draw:frame draw:style-name="fr1" draw:name="Image7" text:anchor-type="char" svg:x="0.6035in" svg:y="0.0772in" svg:width="5.5173in" svg:height="0.4173in" draw:z-index="6"><draw:image xlink:href="Pictures/10000001000003270000003DCDA2B7818780F9C9.png" xlink:type="simple" xlink:show="embed" xlink:actuate="onLoad" draw:mime-type="image/png"/></draw:frame></text:p>
            <text:p text:style-name="P26"/>
            <text:p text:style-name="P26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4T17:01:06.802000000</meta:creation-date>
    <dc:date>2023-09-04T21:42:49.704000000</dc:date>
    <meta:editing-duration>PT19M33S</meta:editing-duration>
    <meta:editing-cycles>2</meta:editing-cycles>
    <meta:generator>LibreOffice/7.4.2.3$Windows_X86_64 LibreOffice_project/382eef1f22670f7f4118c8c2dd222ec7ad009daf</meta:generator>
    <meta:document-statistic meta:table-count="10" meta:image-count="7" meta:object-count="0" meta:page-count="3" meta:paragraph-count="284" meta:word-count="560" meta:character-count="3225" meta:non-whitespace-character-count="2668"/>
  </office:meta>
</office:document-meta>
</file>